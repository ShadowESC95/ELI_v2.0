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w the main event. Here's your r/LocalLLaMA post, written straight and in</text:p>
      <text:p text:style-name="Standard"><text:s text:c="2"/>your honest voice (that crowd rewards candor and punishes hype). Two small</text:p>
      <text:p text:style-name="Standard"><text:s text:c="2"/>spots to personalize are marked […].</text:p>
      <text:p text:style-name="Standard"/>
      <text:p text:style-name="Standard"><text:s text:c="2"/>---</text:p>
      <text:p text:style-name="Standard"><text:s text:c="2"/>Title (pick one)</text:p>
      <text:p text:style-name="Standard"/>
      <text:p text:style-name="Standard"><text:s text:c="2"/>1. I built a fully-local AI assistant that runs 100% on your own machine — </text:p>
      <text:p text:style-name="Standard"><text:s text:c="2"/>voice, vision, desktop control, persistent memory (offline-enforced)</text:p>
      <text:p text:style-name="Standard"><text:s text:c="2"/>2. ELI: a solo, 140k-line local assistant on llama.cpp/GGUF that actually </text:p>
      <text:p text:style-name="Standard"><text:s text:c="2"/>operates your computer — source available</text:p>
      <text:p text:style-name="Standard"><text:s text:c="2"/>3. My fully-offline AI assistant — model-agnostic GGUF, controls the desktop,</text:p>
      <text:p text:style-name="Standard"><text:s text:c="2"/>remembers you, enforces offline at the socket</text:p>
      <text:p text:style-name="Standard"/>
      <text:p text:style-name="Standard"><text:s text:c="2"/>(I'd go with #1 — clearest, no jargon in the hook.)</text:p>
      <text:p text:style-name="Standard"/>
      <text:p text:style-name="Standard"><text:s text:c="2"/>Body</text:p>
      <text:p text:style-name="Standard"/>
      <text:p text:style-name="Standard"><text:s text:c="2"/>▎ What it is</text:p>
      <text:p text:style-name="Standard"><text:s text:c="2"/>▎</text:p>
      <text:p text:style-name="Standard"><text:s text:c="2"/>▎ ELI runs entirely on your own machine — the model, your data, all of it. No</text:p>
      <text:p text:style-name="Standard"><text:s text:c="2"/>▎ cloud, no account, no telemetry. It's offline by default and actually </text:p>
      <text:p text:style-name="Standard"><text:s text:c="2"/>▎ enforces that: a process-wide network guard fail-closes outbound </text:p>
      <text:p text:style-name="Standard"><text:s text:c="2"/>▎ connections at the socket layer, and online actions (web search, news) are </text:p>
      <text:p text:style-name="Standard"><text:s text:c="2"/>▎ explicit and individually gated.</text:p>
      <text:p text:style-name="Standard"><text:s text:c="2"/>▎</text:p>
      <text:p text:style-name="Standard"><text:s text:c="2"/>▎ It's built on llama.cpp / GGUF and is model-agnostic — drop in any local </text:p>
      <text:p text:style-name="Standard"><text:s text:c="2"/>▎ GGUF, it detects the chat template, sizes context to the model's real </text:p>
      <text:p text:style-name="Standard"><text:s text:c="2"/>▎ n_ctx_train, and auto-tunes GPU layers/batch/context to fit your VRAM (runs</text:p>
      <text:p text:style-name="Standard"><text:s text:c="2"/>▎ on 8 GB; scales to multi-GPU). I daily-drive it on [Qwen2.5-7B / whatever </text:p>
      <text:p text:style-name="Standard"><text:s text:c="2"/>▎ you run].</text:p>
      <text:p text:style-name="Standard"><text:s text:c="2"/>▎</text:p>
      <text:p text:style-name="Standard"><text:s text:c="2"/>▎ What it actually does — not just chat:</text:p>
      <text:p text:style-name="Standard"><text:s text:c="2"/>▎ - Operates the desktop — opens/closes/focuses apps, tiles windows, types, </text:p>
      <text:p text:style-name="Standard"><text:s text:c="2"/>▎ clicks, controls media (Spotify/YouTube), clipboard, screenshots</text:p>
      <text:p text:style-name="Standard"><text:s text:c="2"/>▎ - Sees your screen — local vision model + OCR: "what's on my screen?", </text:p>
      <text:p text:style-name="Standard"><text:s text:c="2"/>▎ describe images, summarize PDFs/CSVs</text:p>
      <text:p text:style-name="Standard"><text:s text:c="2"/>▎ - Voice — your own wake word, dictation (faster-whisper), TTS (Piper)</text:p>
      <text:p text:style-name="Standard"><text:s text:c="2"/>▎ - Optional webcam gaze control — click where your eyes rest</text:p>
      <text:p text:style-name="Standard"><text:s text:c="2"/>▎ - Memory that persists — SQLite + a FAISS vector index + a knowledge graph;</text:p>
      <text:p text:style-name="Standard"><text:s text:c="2"/>▎ builds a private profile of you across sessions; learns routines and </text:p>
      <text:p text:style-name="Standard"><text:s text:c="2"/>▎ offers to automate them</text:p>
      <text:p text:style-name="Standard"><text:s text:c="2"/>▎ - Coding agent — plan → verify → repair, fixes bugs in files, examines a </text:p>
      <text:p text:style-name="Standard"><text:s text:c="2"/>▎ codebase</text:p>
      <text:p text:style-name="Standard"><text:s text:c="2"/>▎ - Self-maintenance — logs its own failures, can patch its own source (with </text:p>
      <text:p text:style-name="Standard"><text:s text:c="2"/>▎ rollback), and can LoRA fine-tune the model on your own conversation </text:p>
      <text:p text:style-name="Standard"><text:s text:c="2"/>▎ history</text:p>
      <text:p text:style-name="Standard"><text:s text:c="2"/>▎ - Scheduling — alarms/timers/overnight jobs, proactive briefings</text:p>
      <text:p text:style-name="Standard"><text:s text:c="2"/>▎</text:p>
      <text:p text:style-name="Standard"><text:s text:c="2"/>▎ It's ~140k lines of Python: a 12-stage reasoning pipeline, 14 specialist </text:p>
      <text:p text:style-name="Standard"><text:s text:c="2"/>▎ agents on a DAG orchestrator, a desktop GUI, plus a terminal interface and </text:p>
      <text:p text:style-name="Standard"><text:s text:c="2"/>▎ an optional local-network web view for your phone. Cross-platform </text:p>
      <text:p text:style-name="Standard"><text:soft-page-break/><text:s text:c="2"/>▎ (Linux/CUDA, macOS/Metal, Windows).</text:p>
      <text:p text:style-name="Standard"><text:s text:c="2"/>▎</text:p>
      <text:p text:style-name="Standard"><text:s text:c="2"/>▎ The honest part</text:p>
      <text:p text:style-name="Standard"><text:s text:c="2"/>▎</text:p>
      <text:p text:style-name="Standard"><text:s text:c="2"/>▎ I'm one person and this is a big, sprawling project — ambitious, not </text:p>
      <text:p text:style-name="Standard"><text:s text:c="2"/>▎ perfectly polished. The real ceiling is the local model: a 7–8B on consumer</text:p>
      <text:p text:style-name="Standard"><text:s text:c="2"/>▎ hardware is nowhere near a frontier cloud model, and no amount of </text:p>
      <text:p text:style-name="Standard"><text:s text:c="2"/>▎ scaffolding fully hides that. The trade is deliberate — privacy, ownership,</text:p>
      <text:p text:style-name="Standard"><text:s text:c="2"/>▎ and offline operation in exchange for raw power — and you can swap in </text:p>
      <text:p text:style-name="Standard"><text:s text:c="2"/>▎ better open models as they land.</text:p>
      <text:p text:style-name="Standard"><text:s text:c="2"/>▎</text:p>
      <text:p text:style-name="Standard"><text:s text:c="2"/>▎ It's source-available, not OSI open-source: you can read, run, and modify </text:p>
      <text:p text:style-name="Standard"><text:s text:c="2"/>▎ it freely; you just can't redistribute it. I wanted the code open to learn </text:p>
      <text:p text:style-name="Standard"><text:s text:c="2"/>▎ from while keeping stewardship of the project.</text:p>
      <text:p text:style-name="Standard"><text:s text:c="2"/>▎</text:p>
      <text:p text:style-name="Standard"><text:s text:c="2"/>▎ Repo: https://github.com/ShadowESC95/ELI_MKXI_v2.0_PRO</text:p>
      <text:p text:style-name="Standard"><text:s text:c="2"/>▎</text:p>
      <text:p text:style-name="Standard"><text:s text:c="2"/>▎ It's a solo build and I'd genuinely welcome feedback, criticism, and to </text:p>
      <text:p text:style-name="Standard"><text:s text:c="2"/>▎ hear whether it's useful to anyone but me.</text:p>
      <text:p text:style-name="Standard"/>
      <text:p text:style-name="Standard"><text:s text:c="2"/>---</text:p>
      <text:p text:style-name="Standard"><text:s text:c="2"/>Before you hit post — 4 quick things</text:p>
      <text:p text:style-name="Standard"/>
      <text:p text:style-name="Standard"><text:s text:c="2"/>1. A demo clip is the single most important thing. "It controls your</text:p>
      <text:p text:style-name="Standard"><text:s text:c="2"/>computer" is only believable if they see it. Record a silent ~45–60s screen</text:p>
      <text:p text:style-name="Standard"><text:s text:c="2"/>capture (use OBS Studio, or your OS recorder) of 5–6 actions, then drop it</text:p>
      <text:p text:style-name="Standard"><text:s text:c="2"/>straight into the Reddit post. Suggested shot list:</text:p>
      <text:p text:style-name="Standard"><text:s text:c="4"/>- say/type "open Firefox" → it opens</text:p>
      <text:p text:style-name="Standard"><text:s text:c="4"/>- "what's on my screen?" → it describes it</text:p>
      <text:p text:style-name="Standard"><text:s text:c="4"/>- "play [song] on Spotify" → it plays</text:p>
      <text:p text:style-name="Standard"><text:s text:c="4"/>- drag in a PDF → "summarize this"</text:p>
      <text:p text:style-name="Standard"><text:s text:c="4"/>- "remember I prefer X" … then "what do you know about me?"</text:p>
      <text:p text:style-name="Standard"><text:s text:c="4"/>- flip your network off → show it still answering</text:p>
      <text:p text:style-name="Standard"><text:s text:c="2"/>2. New Reddit accounts get filtered. A brand-new zero-karma account often</text:p>
      <text:p text:style-name="Standard"><text:s text:c="2"/>gets auto-held by the spam filter or mod queue. Comment helpfully on a couple</text:p>
      <text:p text:style-name="Standard"><text:s text:c="2"/>of posts first to get a little karma, and if your post doesn't appear after</text:p>
      <text:p text:style-name="Standard"><text:s text:c="2"/>posting, it's likely in the mod queue — wait a bit or politely message the</text:p>
      <text:p text:style-name="Standard"><text:s text:c="2"/>mods.</text:p>
      <text:p text:style-name="Standard"><text:s text:c="2"/>3. Check post flair. r/LocalLLaMA may require you to pick a flair (e.g.</text:p>
      <text:p text:style-name="Standard"><text:s text:c="2"/>"Resources" or "Other") — it'll prompt you.</text:p>
      <text:p text:style-name="Standard"><text:s text:c="2"/>4. Be around for the first 1–2 hours. Reply to every comment quickly — early</text:p>
      <text:p text:style-name="Standard"><text:s text:c="2"/>engagement is what pushes a post up. Don't blast it to five subreddits at</text:p>
      <text:p text:style-name="Standard"><text:s text:c="2"/>once (reads as spam); start with r/LocalLLaMA, and r/selfhosted can come</text:p>
      <text:p text:style-name="Standard"><text:s text:c="2"/>later.</text:p>
      <text:p text:style-name="Standard"/>
      <text:p text:style-name="Standard"><text:s text:c="2"/>---</text:p>
      <text:p text:style-name="Standard"><text:s text:c="2"/>Want me to also write a shorter "Show HN" version for Hacker News (different</text:p>
      <text:p text:style-name="Standard"><text:s text:c="2"/>tone — terser, more technical), so you've got a second shot lined up? And</text:p>
      <text:p text:style-name="Standard"><text:s text:c="2"/>tell me what model you actually daily-drive so I can lock that line in</text:p>
      <text:p text:style-name="Standard"><text:s text:c="2"/>instead of the placeholder.</text:p>
      <text:p text:style-name="Standard"/>
      <text:p text:style-name="Standard">✻ Worked for 1m 50s · 1 shell still running</text:p>
      <text:p text:style-name="Standard"><text:soft-page-break/></text:p>
      <text:p text:style-name="Standard">❯ what other thanks bud, yeah put in the most relevant tags for maximum <text:s text:c="7"/></text:p>
      <text:p text:style-name="Standard"><text:s text:c="2"/>noticability on GH without over doing it <text:s text:c="36"/></text:p>
      <text:p text:style-name="Standard"><text:s text:c="2"/></text:p>
      <text:p text:style-name="Standard">● On it. I'll curate down to a tight, high-signal set — dropping the two</text:p>
      <text:p text:style-name="Standard"><text:s text:c="2"/>redundant ones (local-ai overlaps local-llm; offline-first overlaps</text:p>
      <text:p text:style-name="Standard"><text:s text:c="2"/>offline-ai) so it targets cleanly without keyword-stuffing. GitHub allows 20,</text:p>
      <text:p text:style-name="Standard"><text:s text:c="2"/>but a focused ~12 reads as deliberate, not spammy:</text:p>
      <text:p text:style-name="Standard"/>
      <text:p text:style-name="Standard">● Bash(cd /home/jay/Desktop/ELI_MKXI-main_MAY_NEWEST</text:p>
      <text:p text:style-name="Standard"><text:s text:c="6"/>gh api -X PUT repos/ShadowESC95/ELI_MKXI_v2.0_PRO/topics \…)</text:p>
      <text:p text:style-name="Standard"><text:s text:c="2"/>⎿  [</text:p>
      <text:p text:style-name="Standard"><text:s text:c="7"/>"ai-agent",</text:p>
      <text:p text:style-name="Standard"><text:s text:c="7"/>"ai-assistant",</text:p>
      <text:p text:style-name="Standard"><text:s text:c="5"/>… +14 lines (ctrl+o to expand)</text:p>
      <text:p text:style-name="Standard"><text:s text:c="2"/>⎿  Allowed by auto mode classifier</text:p>
      <text:p text:style-name="Standard"><text:s text:c="2"/></text:p>
      <text:p text:style-name="Standard">❯ and yes the HackerNews one also please <text:s text:c="38"/></text:p>
      <text:p text:style-name="Standard"/>
      <text:p text:style-name="Standard">● Topics locked in at a clean 12 — ai-assistant, local-llm, llm, ai-agent,</text:p>
      <text:p text:style-name="Standard"><text:s text:c="2"/>llama-cpp, gguf, voice-assistant, privacy, offline-ai, self-hosted, python,</text:p>
      <text:p text:style-name="Standard"><text:s text:c="2"/>desktop-assistant. Focused, all accurate, no stuffing. They'll show as</text:p>
      <text:p text:style-name="Standard"><text:s text:c="2"/>clickable chips under your repo description and feed GitHub's topic-browse</text:p>
      <text:p text:style-name="Standard"><text:s text:c="2"/>pages.</text:p>
      <text:p text:style-name="Standard"/>
      <text:p text:style-name="Standard"><text:s text:c="2"/>Now the Hacker News "Show HN" version — terser and more technical than the</text:p>
      <text:p text:style-name="Standard"><text:s text:c="2"/>Reddit one, because the HN crowd values signal density and is allergic to</text:p>
      <text:p text:style-name="Standard"><text:s text:c="2"/>marketing.</text:p>
      <text:p text:style-name="Standard"/>
      <text:p text:style-name="Standard"><text:s text:c="2"/>---</text:p>
      <text:p text:style-name="Standard"><text:s text:c="2"/>Title (pick one — HN rule: factual, no hype words)</text:p>
      <text:p text:style-name="Standard"/>
      <text:p text:style-name="Standard"><text:s text:c="2"/>1. Show HN: ELI – a fully-local AI assistant that controls your desktop </text:p>
      <text:p text:style-name="Standard"><text:s text:c="2"/>(llama.cpp)</text:p>
      <text:p text:style-name="Standard"><text:s text:c="2"/>2. Show HN: ELI – an offline-first AI assistant with desktop control and </text:p>
      <text:p text:style-name="Standard"><text:s text:c="2"/>persistent memory</text:p>
      <text:p text:style-name="Standard"><text:s text:c="2"/>3. Show HN: A 140k-line local AI assistant that runs entirely on your machine</text:p>
      <text:p text:style-name="Standard"/>
      <text:p text:style-name="Standard"><text:s text:c="2"/>(I'd use #1.)</text:p>
      <text:p text:style-name="Standard"/>
      <text:p text:style-name="Standard"><text:s text:c="2"/>How HN works (important — different from Reddit)</text:p>
      <text:p text:style-name="Standard"/>
      <text:p text:style-name="Standard"><text:s text:c="2"/>On a Show HN you submit the repo URL as the link itself, then immediately </text:p>
      <text:p text:style-name="Standard"><text:s text:c="2"/>post the explanation below as your own first comment. You don't paste it into</text:p>
      <text:p text:style-name="Standard"><text:s text:c="2"/>the submission body. Submit at news.ycombinator.com/submit.</text:p>
      <text:p text:style-name="Standard"/>
      <text:p text:style-name="Standard"><text:s text:c="2"/>The first comment (paste right after submitting)</text:p>
      <text:p text:style-name="Standard"/>
      <text:p text:style-name="Standard"><text:s text:c="2"/>▎ ELI runs entirely on your own machine — model, data, and all processing </text:p>
      <text:p text:style-name="Standard"><text:s text:c="2"/>▎ local. No cloud, no account, no telemetry. It's offline by default and </text:p>
      <text:p text:style-name="Standard"><text:s text:c="2"/>▎ enforces it: a process-wide network guard fail-closes outbound connections </text:p>
      <text:p text:style-name="Standard"><text:s text:c="2"/>▎ at the socket layer; the few online actions (web search, news) are explicit</text:p>
      <text:p text:style-name="Standard"><text:soft-page-break/><text:s text:c="2"/>▎ and individually gated.</text:p>
      <text:p text:style-name="Standard"><text:s text:c="2"/>▎</text:p>
      <text:p text:style-name="Standard"><text:s text:c="2"/>▎ Built on llama.cpp/GGUF and model-agnostic — drop in any GGUF, it reads the</text:p>
      <text:p text:style-name="Standard"><text:s text:c="2"/>▎ chat template, sizes context to the model's real n_ctx_train, and </text:p>
      <text:p text:style-name="Standard"><text:s text:c="2"/>▎ auto-tunes GPU layers/batch/context to fit available VRAM (runs on 8 GB, </text:p>
      <text:p text:style-name="Standard"><text:s text:c="2"/>▎ scales to multi-GPU). I run it on [Qwen2.5-7B / whatever you daily-drive].</text:p>
      <text:p text:style-name="Standard"><text:s text:c="2"/>▎</text:p>
      <text:p text:style-name="Standard"><text:s text:c="2"/>▎ Beyond chat it acts on the machine: desktop control (apps, windows, input, </text:p>
      <text:p text:style-name="Standard"><text:s text:c="2"/>▎ media, clipboard, screenshots), screen reading via a local vision model + </text:p>
      <text:p text:style-name="Standard"><text:s text:c="2"/>▎ OCR, voice in/out (faster-whisper + Piper) with a configurable wake word, </text:p>
      <text:p text:style-name="Standard"><text:s text:c="2"/>▎ optional webcam gaze control, persistent memory (SQLite + FAISS + a </text:p>
      <text:p text:style-name="Standard"><text:s text:c="2"/>▎ knowledge graph) that builds a profile of you across sessions, a coding </text:p>
      <text:p text:style-name="Standard"><text:s text:c="2"/>▎ agent (plan→verify→repair), self-patching of its own source with rollback, </text:p>
      <text:p text:style-name="Standard"><text:s text:c="2"/>▎ LoRA fine-tuning on your own conversation history, and scheduled/overnight </text:p>
      <text:p text:style-name="Standard"><text:s text:c="2"/>▎ jobs.</text:p>
      <text:p text:style-name="Standard"><text:s text:c="2"/>▎</text:p>
      <text:p text:style-name="Standard"><text:s text:c="2"/>▎ ~140k lines of Python: a 12-stage pipeline, 14 agents on a DAG </text:p>
      <text:p text:style-name="Standard"><text:s text:c="2"/>▎ orchestrator, a desktop GUI, a terminal interface, and an optional </text:p>
      <text:p text:style-name="Standard"><text:s text:c="2"/>▎ local-network web view.</text:p>
      <text:p text:style-name="Standard"><text:s text:c="2"/>▎</text:p>
      <text:p text:style-name="Standard"><text:s text:c="2"/>▎ Honest caveats: I'm one person; it's large and not perfectly polished. The </text:p>
      <text:p text:style-name="Standard"><text:s text:c="2"/>▎ ceiling is the local model — a 7–8B on consumer hardware is well short of a</text:p>
      <text:p text:style-name="Standard"><text:s text:c="2"/>▎ frontier cloud model, and the scaffolding doesn't hide that. The bet is </text:p>
      <text:p text:style-name="Standard"><text:s text:c="2"/>▎ that privacy, ownership, and offline operation are worth it, and that you </text:p>
      <text:p text:style-name="Standard"><text:s text:c="2"/>▎ can swap in stronger open models as they arrive.</text:p>
      <text:p text:style-name="Standard"><text:s text:c="2"/>▎</text:p>
      <text:p text:style-name="Standard"><text:s text:c="2"/>▎ License: source-available (PolyForm Internal Use), not OSI open-source — </text:p>
      <text:p text:style-name="Standard"><text:s text:c="2"/>▎ read, run, and modify, but not redistribute. Happy to discuss the choice; I</text:p>
      <text:p text:style-name="Standard"><text:s text:c="2"/>▎ wanted the source open to learn from while keeping stewardship.</text:p>
      <text:p text:style-name="Standard"><text:s text:c="2"/>▎</text:p>
      <text:p text:style-name="Standard"><text:s text:c="2"/>▎ Feedback and criticism welcome.</text:p>
      <text:p text:style-name="Standard"/>
      <text:p text:style-name="Standard"><text:s text:c="2"/>HN-specific tips</text:p>
      <text:p text:style-name="Standard"/>
      <text:p text:style-name="Standard"><text:s text:c="2"/>- Best time: a weekday, ~8–10am US Eastern, gets the most eyes. Posting into</text:p>
      <text:p text:style-name="Standard"><text:s text:c="2"/>a quiet hour can sink it before anyone sees it.</text:p>
      <text:p text:style-name="Standard"><text:s text:c="2"/>- Expect bluntness, especially on the license. HN leans hard pro-OSI; some</text:p>
      <text:p text:style-name="Standard"><text:s text:c="2"/>will push back on "source-available, not open-source." That's fine — answer</text:p>
      <text:p text:style-name="Standard"><text:s text:c="2"/>calmly and factually (it's your work, your call). The "happy to discuss the</text:p>
      <text:p text:style-name="Standard"><text:s text:c="2"/>choice" line preempts it. Don't get defensive; engaged, non-prickly authors</text:p>
      <text:p text:style-name="Standard"><text:s text:c="2"/>do well.</text:p>
      <text:p text:style-name="Standard"><text:s text:c="2"/>- Never ask for upvotes — it's against the rules and HN punishes it.</text:p>
      <text:p text:style-name="Standard"><text:s text:c="2"/>- Be present for the first couple hours to answer technical questions</text:p>
      <text:p text:style-name="Standard"><text:s text:c="2"/>quickly.</text:p>
      <text:p text:style-name="Standard"><text:s text:c="2"/>- A short demo clip/GIF linked in your comment helps here too, same as</text:p>
      <text:p text:style-name="Standard"><text:s text:c="2"/>Reddit.</text:p>
      <text:p text:style-name="Standard"><text:s text:c="2"/></text:p>
      <text:p text:style-name="Standard"><text:s text:c="2"/>---</text:p>
      <text:p text:style-name="Standard"><text:s text:c="2"/>One thing to lock both posts down: what model do you actually daily-drive?</text:p>
      <text:p text:style-name="Standard"><text:s text:c="2"/>One thing to lock both posts down: what model do you actually daily-drive?</text:p>
      <text:p text:style-name="Standard"><text:s text:c="2"/>Tell me and I'll swap it into both the Reddit and HN versions so there's no</text:p>
      <text:p text:style-name="Standard"><text:s text:c="2"/>placeholder. After that you've got two ready-to-fire posts + a tagged,</text:p>
      <text:p text:style-name="Standard"><text:soft-page-break/><text:s text:c="2"/>discoverable repo — that's the whole "notice" playbook in hand.</text:p>
      <text:p text:style-name="Standard"/>
      <text:p text:style-name="Standard">✻ Brewed for 1m 39s · 1 shell still running</text:p>
      <text:p text:style-name="Standard"/>
      <text:p text:style-name="Standard">❯ please create a full document with every step in terms of the marketing and <text:s/></text:p>
      <text:p text:style-name="Standard"><text:s text:c="2"/>applying to threads and boards- full steps, as a pdf in the /blueprints <text:s text:c="5"/></text:p>
      <text:p text:style-name="Standard"><text:s text:c="2"/>folder - i wnt in depthness, steps, drafts- the works! <text:s text:c="22"/></text:p>
      <text:p text:style-name="Standard"/>
      <text:p text:style-name="Standard">● Love it — a full outreach playbook. Let me first check how the existing</text:p>
      <text:p text:style-name="Standard"><text:s text:c="2"/>blueprint PDFs were built so this one matches their style and uses the same</text:p>
      <text:p text:style-name="Standard"><text:s text:c="2"/>pipeline.</text:p>
      <text:p text:style-name="Standard"/>
      <text:p text:style-name="Standard">● Bash(cd /home/jay/Desktop/ELI_MKXI-main_MAY_NEWEST</text:p>
      <text:p text:style-name="Standard"><text:s text:c="6"/>echo "=== blueprint PDF build tooling ==="…)</text:p>
      <text:p text:style-name="Standard"><text:s text:c="2"/>⎿  === blueprint PDF build tooling ===</text:p>
      <text:p text:style-name="Standard"><text:s text:c="5"/>-rw-rw-r-- 1 jay jay 5100 Jun 18 22:09 blueprints/build_blueprint_pdf</text:p>
      <text:p text:style-name="Standard"><text:s text:c="5"/>.py</text:p>
      <text:p text:style-name="Standard"><text:s text:c="5"/>… +77 lines (ctrl+o to expand)</text:p>
      <text:p text:style-name="Standard"/>
      <text:p text:style-name="Standard">● The existing pipeline uses pandoc (available). Let me see the rest of the</text:p>
      <text:p text:style-name="Standard"><text:s text:c="2"/>script — which PDF engine it calls — and confirm that engine is installed:</text:p>
      <text:p text:style-name="Standard"/>
      <text:p text:style-name="Standard">● Bash(cd /home/jay/Desktop/ELI_MKXI-main_MAY_NEWEST</text:p>
      <text:p text:style-name="Standard"><text:s text:c="6"/>echo "=== rest of build_blueprint_pdf.py (engine + pandoc args) ==="…)</text:p>
      <text:p text:style-name="Standard"><text:s text:c="2"/>⎿  === rest of build_blueprint_pdf.py (engine + pandoc args) ===</text:p>
      <text:p text:style-name="Standard"><text:s text:c="9"/>text = re.sub(r"^#\s+.+\n", "", text, count=1, flags=re.M)</text:p>
      <text:p text:style-name="Standard"><text:s text:c="9"/>text = re.sub(r"^\*[^*\n].*\*\s*\n", "", text, count=1, flags=re.</text:p>
      <text:p text:style-name="Standard"><text:s text:c="5"/>… +58 lines (ctrl+o to expand)</text:p>
      <text:p text:style-name="Standard"><text:s text:c="2"/>⎿  Allowed by auto mode classifier</text:p>
      <text:p text:style-name="Standard"><text:s text:c="2"/></text:p>
      <text:p text:style-name="Standard">● Perfect — the pipeline is pandoc → xelatex (both installed), same as your</text:p>
      <text:p text:style-name="Standard"><text:s text:c="2"/>other blueprint PDFs, so this will match their styling. Let me write the full</text:p>
      <text:p text:style-name="Standard"><text:s text:c="2"/>playbook, then build it.</text:p>
      <text:p text:style-name="Standard"/>
      <text:p text:style-name="Standard">● Write(blueprints/eli_marketing_and_outreach_playbook.md)</text:p>
      <text:p text:style-name="Standard"><text:s text:c="2"/>⎿  Wrote 407 lines to blueprints/eli_marketing_and_outreach_playbook.md</text:p>
      <text:p text:style-name="Standard"><text:s text:c="6"/>2 *A complete, step-by-step guide to getting ELI noticed — written</text:p>
      <text:p text:style-name="Standard"><text:s text:c="9"/>for someone who has never done this before.*</text:p>
      <text:p text:style-name="Standard"><text:s text:c="6"/>3 </text:p>
      <text:p text:style-name="Standard"><text:s text:c="6"/>4 &gt; **One thing to set before you use this:** wherever you see **[</text:p>
      <text:p text:style-name="Standard"><text:s text:c="8"/>YOUR MODEL]**, replace it with the</text:p>
      <text:p text:style-name="Standard"><text:s text:c="9"/>in the post drafts. daily-drive (e.g. *Qwen2.5-7B*). It appears</text:p>
      <text:p text:style-name="Standard"><text:s text:c="6"/>6 </text:p>
      <text:p text:style-name="Standard"><text:s text:c="6"/>7 ---</text:p>
      <text:p text:style-name="Standard"><text:s text:c="6"/>8 </text:p>
      <text:p text:style-name="Standard"><text:s text:c="6"/>9 ## 0. Read this first — mindset and realistic expectations</text:p>
      <text:p text:style-name="Standard"><text:s text:c="5"/>… +591 lines (ctrl+o to expand)</text:p>
      <text:p text:style-name="Standard"/>
      <text:p text:style-name="Standard">● Now build it to PDF using the existing pipeline:</text:p>
      <text:p text:style-name="Standard"/>
      <text:p text:style-name="Standard">● Bash(cd /home/jay/Desktop/ELI_MKXI-main_MAY_NEWEST</text:p>
      <text:p text:style-name="Standard"><text:s text:c="6"/>.venv/bin/python blueprints/build_blueprint_pdf.py</text:p>
      <text:p text:style-name="Standard"><text:soft-page-break/><text:s text:c="6"/>blueprints/eli_marketing_and_outreach_playbook.md 2&gt;&amp;1 | tail -…)</text:p>
      <text:p text:style-name="Standard"><text:s text:c="2"/>⎿   <text:s/>✓ eli_marketing_and_outreach_playbook.md → eli_marketing_and_outrea</text:p>
      <text:p text:style-name="Standard"><text:s text:c="5"/>ch_playbook.pdf (90 KB)</text:p>
      <text:p text:style-name="Standard"><text:s text:c="5"/>… +5 lines (ctrl+o to expand)</text:p>
      <text:p text:style-name="Standard"><text:s text:c="2"/>⎿  Allowed by auto mode classifier</text:p>
      <text:p text:style-name="Standard"/>
      <text:p text:style-name="Standard">● Built — 90 KB. Let me verify it rendered cleanly (valid PDF, page count,</text:p>
      <text:p text:style-name="Standard"><text:s text:c="2"/>content intact, no LaTeX mangling):</text:p>
      <text:p text:style-name="Standard"/>
      <text:p text:style-name="Standard">● Bash(cd /home/jay/Desktop/ELI_MKXI-main_MAY_NEWEST</text:p>
      <text:p text:style-name="Standard"><text:s text:c="6"/>echo "=== PDF info ==="…)</text:p>
      <text:p text:style-name="Standard"><text:s text:c="2"/>⎿  === PDF info ===</text:p>
      <text:p text:style-name="Standard"><text:s text:c="5"/>Producer: <text:s text:c="7"/>xdvipdfmx (20220710)</text:p>
      <text:p text:style-name="Standard"><text:s text:c="5"/>Pages: <text:s text:c="10"/>8</text:p>
      <text:p text:style-name="Standard"><text:s text:c="5"/>… +19 lines (ctrl+o to expand)</text:p>
      <text:p text:style-name="Standard"><text:s text:c="2"/>⎿  Allowed by auto mode classifier</text:p>
      <text:p text:style-name="Standard"><text:s text:c="2"/></text:p>
      <text:p text:style-name="Standard">● Done — the PDF built cleanly: 8 pages, full table of contents, all sections</text:p>
      <text:p text:style-name="Standard"><text:s text:c="2"/>and appendices rendered, drafts intact, no formatting breakage.</text:p>
      <text:p text:style-name="Standard"/>
      <text:p text:style-name="Standard">● Bash(cd /home/jay/Desktop/ELI_MKXI-main_MAY_NEWEST</text:p>
      <text:p text:style-name="Standard"><text:s text:c="6"/>echo "=== file in place ==="…)</text:p>
      <text:p text:style-name="Standard"><text:s text:c="2"/>⎿  === file in place ===</text:p>
      <text:p text:style-name="Standard"><text:s text:c="5"/>-rw-rw-r-- 1 jay jay 23307 Jun 19 03:28 blueprints/eli_marketing_and_</text:p>
      <text:p text:style-name="Standard"><text:s text:c="5"/>outreach_playbook.md</text:p>
      <text:p text:style-name="Standard"><text:s text:c="5"/>… +10 lines (ctrl+o to expand)</text:p>
      <text:p text:style-name="Standard"/>
      <text:p text:style-name="Standard">● Your full marketing playbook is ready:</text:p>
      <text:p text:style-name="Standard"/>
      <text:p text:style-name="Standard"><text:s text:c="2"/>📄 blueprints/eli_marketing_and_outreach_playbook.pdf (8 pages, + the .md</text:p>
      <text:p text:style-name="Standard"><text:s text:c="2"/>source alongside it)</text:p>
      <text:p text:style-name="Standard"/>
      <text:p text:style-name="Standard"><text:s text:c="2"/>It's local-only (blueprints stays gitignored — this is your internal</text:p>
      <text:p text:style-name="Standard"><text:s text:c="2"/>strategy, not public), and built with the same pandoc→xelatex pipeline as</text:p>
      <text:p text:style-name="Standard"><text:s text:c="2"/>your other blueprint PDFs so it matches their styling.</text:p>
      <text:p text:style-name="Standard"/>
      <text:p text:style-name="Standard"><text:s text:c="2"/>What's inside — the works:</text:p>
      <text:p text:style-name="Standard"/>
      <text:p text:style-name="Standard"><text:s text:c="2"/>- §0 Mindset — honest expectations (notice is achievable, donations rarely;</text:p>
      <text:p text:style-name="Standard"><text:s text:c="2"/>what a real "success" looks like)</text:p>
      <text:p text:style-name="Standard"><text:s text:c="2"/>- §1 Pre-launch checklist — what must be ready on the repo before you drive</text:p>
      <text:p text:style-name="Standard"><text:s text:c="2"/>traffic (with status: done vs to-do)</text:p>
      <text:p text:style-name="Standard"><text:s text:c="2"/>- §2 Accounts &amp; the "new account" trap — why a fresh account gets silently</text:p>
      <text:p text:style-name="Standard"><text:s text:c="2"/>filtered, and how to warm it up</text:p>
      <text:p text:style-name="Standard"><text:s text:c="2"/>- §3 Two-week launch calendar — sequenced day-by-day so you never look like a</text:p>
      <text:p text:style-name="Standard"><text:s text:c="2"/>spammer</text:p>
      <text:p text:style-name="Standard"><text:s text:c="2"/>- §4 Channel-by-channel — r/LocalLLaMA, Hacker News, r/selfhosted, other subs</text:p>
      <text:p text:style-name="Standard"><text:s text:c="2"/>(with a "worth it?" table), GitHub itself, YouTube/X/Mastodon/dev.to/Discord</text:p>
      <text:p text:style-name="Standard"><text:s text:c="2"/>- §5 Engagement playbook — the exact questions you'll get (license pushback,</text:p>
      <text:p text:style-name="Standard"><text:s text:c="2"/>"isn't this just a wrapper?", "another Jarvis clone?") with ready answers</text:p>
      <text:p text:style-name="Standard"><text:s text:c="2"/>- §6 The demo clip — tools + exact 6-shot list (it's flagged as your single</text:p>
      <text:p text:style-name="Standard"><text:s text:c="2"/>most important asset)</text:p>
      <text:p text:style-name="Standard"><text:soft-page-break/><text:s text:c="2"/>- §7 Metrics + §8 Do's &amp; Don'ts (anti-spam survival)</text:p>
      <text:p text:style-name="Standard"><text:s text:c="2"/>- Appendix A — every copy-paste draft: GitHub About line, r/LocalLLaMA post,</text:p>
      <text:p text:style-name="Standard"><text:s text:c="2"/>HN Show HN, r/selfhosted variant, X/Mastodon post, reusable blurb, dev.to</text:p>
      <text:p text:style-name="Standard"><text:s text:c="2"/>outline</text:p>
      <text:p text:style-name="Standard"><text:s text:c="2"/>- Appendix B — a 60-second pre-flight checklist for right before you hit</text:p>
      <text:p text:style-name="Standard"><text:s text:c="2"/>"post"</text:p>
      <text:p text:style-name="Standard"/>
      <text:p text:style-name="Standard"><text:s text:c="2"/>Two notes:</text:p>
      <text:p text:style-name="Standard"><text:s text:c="2"/>1. The drafts have a [YOUR MODEL] placeholder in 5 spots — tell me what you</text:p>
      <text:p text:style-name="Standard"><text:s text:c="2"/>daily-drive (e.g. Qwen2.5-7B) and I'll bake it in and rebuild the PDF so it's</text:p>
      <text:p text:style-name="Standard"><text:s text:c="2"/>100% ready to fire.</text:p>
      <text:p text:style-name="Standard"><text:s text:c="2"/>2. The two genuine to-dos before launching are the demo clip and the</text:p>
      <text:p text:style-name="Standard"><text:s text:c="2"/>social-preview image — they're the biggest levers, and §6 / §4.5 walk you</text:p>
      <text:p text:style-name="Standard"><text:s text:c="2"/>through bo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07:01:00.158623078</meta:creation-date>
    <dc:date>2026-06-19T07:01:36.932092599</dc:date>
    <meta:editing-duration>PT37S</meta:editing-duration>
    <meta:editing-cycles>1</meta:editing-cycles>
    <meta:document-statistic meta:table-count="0" meta:image-count="0" meta:object-count="0" meta:page-count="7" meta:paragraph-count="286" meta:word-count="2318" meta:character-count="14886" meta:non-whitespace-character-count="11923"/>
    <meta:generator>LibreOffice/24.2.7.2$Linux_X86_64 LibreOffice_project/420$Build-2</meta:generator>
  </office:meta>
</office:document-meta>
</file>